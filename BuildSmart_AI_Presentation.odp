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f153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5f7fb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6e6ff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1e2761" draw:fill="solid" draw:fill-color="#1e2761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f96167" draw:fill="solid" draw:fill-color="#f96167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cadcfc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1e2761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f5f7fb" draw:fill="solid" draw:fill-color="#f5f7fb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2e86de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cadcfc" draw:fill="solid" draw:fill-color="#cadcfc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ffe4d6" draw:fill="solid" draw:fill-color="#ffe4d6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d4e8dc" draw:fill="solid" draw:fill-color="#d4e8dc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2c5f2d" draw:fill="solid" draw:fill-color="#2c5f2d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e8e4f0" draw:fill="solid" draw:fill-color="#e8e4f0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4a3b6b" draw:fill="solid" draw:fill-color="#4a3b6b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cadcfc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1e2761" draw:fill="solid" draw:fill-color="#ccffcc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f96167" draw:fill="solid" draw:fill-color="#83caff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1e2761" draw:fill="solid" draw:fill-color="#ffffcc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5.24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5.24cm" fo:padding-top="0.125cm" fo:padding-bottom="0.125cm" fo:padding-left="0.25cm" fo:padding-right="0.25cm" fo:wrap-option="wrap"/>
    </style:style>
    <style:style style:name="pr3" style:family="presentation" style:parent-style-name="Default-backgroundobjects" style:list-style-name="L3">
      <style:graphic-properties draw:stroke="none" svg:stroke-width="0cm" draw:fill="none" draw:fill-color="#ffffff" draw:textarea-vertical-align="top" draw:auto-grow-height="false" fo:min-height="15.24cm" fo:padding-top="0.125cm" fo:padding-bottom="0.125cm" fo:padding-left="0.25cm" fo:padding-right="0.25cm" fo:wrap-option="wrap"/>
    </style:style>
    <style:style style:name="pr4" style:family="presentation" style:parent-style-name="Default-backgroundobjects" style:list-style-name="L3">
      <style:graphic-properties draw:stroke="none" svg:stroke-width="0cm" draw:fill="none" draw:fill-color="#ffffff" draw:textarea-vertical-align="top" draw:auto-grow-height="false" fo:min-height="15.24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4" style:family="paragraph">
      <style:paragraph-properties style:font-independent-line-spacing="true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.282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bold" style:font-family-asian="Calibri" style:font-pitch-asian="fixed" style:font-size-asian="20pt" style:font-style-asian="normal" style:font-weight-asian="bold" style:font-family-complex="Calibri" style:font-family-generic-complex="swiss" style:font-size-complex="20pt" style:font-style-complex="normal" style:font-weight-complex="bold"/>
    </style:style>
    <style:style style:name="T2" style:family="text">
      <style:text-properties fo:color="#000000" style:text-line-through-style="none" fo:font-family="Calibri" style:font-family-generic="swiss" fo:font-size="64pt" fo:letter-spacing="normal" fo:font-style="normal" style:text-underline-style="none" fo:font-weight="bold" style:font-family-asian="Calibri" style:font-pitch-asian="fixed" style:font-size-asian="64pt" style:font-style-asian="normal" style:font-weight-asian="bold" style:font-family-complex="Calibri" style:font-family-generic-complex="swiss" style:font-size-complex="64pt" style:font-style-complex="normal" style:font-weight-complex="bold"/>
    </style:style>
    <style:style style:name="T3" style:family="text">
      <style:text-properties fo:color="#000000" style:text-line-through-style="none" fo:font-family="Calibri" style:font-family-generic="swiss" fo:font-size="22pt" fo:letter-spacing="normal" fo:font-style="italic" style:text-underline-style="none" fo:font-weight="normal" style:font-family-asian="Calibri" style:font-pitch-asian="fixed" style:font-size-asian="22pt" style:font-style-asian="italic" style:font-weight-asian="normal" style:font-family-complex="Calibri" style:font-family-generic-complex="swiss" style:font-size-complex="22pt" style:font-style-complex="italic" style:font-weight-complex="normal"/>
    </style:style>
    <style:style style:name="T4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normal" style:font-family-asian="Calibri" style:font-pitch-asian="fixed" style:font-size-asian="14pt" style:font-style-asian="normal" style:font-weight-asian="normal" style:font-family-complex="Calibri" style:font-family-generic-complex="swiss" style:font-size-complex="14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style:font-family-generic="swiss" fo:font-size="22pt" fo:letter-spacing="normal" fo:font-style="normal" style:text-underline-style="none" fo:font-weight="bold" style:font-family-asian="Calibri" style:font-pitch-asian="fixed" style:font-size-asian="22pt" style:font-style-asian="normal" style:font-weight-asian="bold" style:font-family-complex="Calibri" style:font-family-generic-complex="swiss" style:font-size-complex="22pt" style:font-style-complex="normal" style:font-weight-complex="bold"/>
    </style:style>
    <style:style style:name="T7" style:family="text">
      <style:text-properties fo:color="#000000" style:text-line-through-style="none" fo:font-family="Calibri" style:font-family-generic="swiss" fo:font-size="40pt" fo:letter-spacing="normal" fo:font-style="normal" style:text-underline-style="none" fo:font-weight="bold" style:font-family-asian="Calibri" style:font-pitch-asian="fixed" style:font-size-asian="40pt" style:font-style-asian="normal" style:font-weight-asian="bold" style:font-family-complex="Calibri" style:font-family-generic-complex="swiss" style:font-size-complex="40pt" style:font-style-complex="normal" style:font-weight-complex="bold"/>
    </style:style>
    <style:style style:name="T8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Calibri" style:font-pitch-asian="fixed" style:font-size-asian="20pt" style:font-style-asian="normal" style:font-weight-asian="normal" style:font-family-complex="Calibri" style:font-family-generic-complex="swiss" style:font-size-complex="20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bold" style:font-family-asian="Calibri" style:font-pitch-asian="fixed" style:font-size-asian="18pt" style:font-style-asian="normal" style:font-weight-asian="bold" style:font-family-complex="Calibri" style:font-family-generic-complex="swiss" style:font-size-complex="18pt" style:font-style-complex="normal" style:font-weight-complex="bold"/>
    </style:style>
    <style:style style:name="T10" style:family="text">
      <style:text-properties fo:color="#000000" style:text-line-through-style="none" fo:font-family="Calibri" style:font-family-generic="swiss" fo:font-size="10pt" fo:letter-spacing="normal" fo:font-style="normal" style:text-underline-style="none" fo:font-weight="normal" style:font-family-asian="Calibri" style:font-pitch-asian="fixed" style:font-size-asian="10pt" style:font-style-asian="normal" style:font-weight-asian="normal" style:font-family-complex="Calibri" style:font-family-generic-complex="swiss" style:font-size-complex="10pt" style:font-style-complex="normal" style:font-weight-complex="normal"/>
    </style:style>
    <style:style style:name="T11" style:family="text">
      <style:text-properties fo:color="#00000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000000" style:text-line-through-style="none" fo:font-family="Calibri" style:font-family-generic="swiss" fo:font-size="80pt" fo:letter-spacing="normal" fo:font-style="normal" style:text-underline-style="none" fo:font-weight="bold" style:font-family-asian="Calibri" style:font-pitch-asian="fixed" style:font-size-asian="80pt" style:font-style-asian="normal" style:font-weight-asian="bold" style:font-family-complex="Calibri" style:font-family-generic-complex="swiss" style:font-size-complex="80pt" style:font-style-complex="normal" style:font-weight-complex="bold"/>
    </style:style>
    <style:style style:name="T13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family-complex="Calibri" style:font-family-generic-complex="swiss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style:font-family-generic="swiss" fo:font-size="18pt" fo:letter-spacing="normal" fo:font-style="italic" style:text-underline-style="none" fo:font-weight="normal" style:font-family-asian="Calibri" style:font-pitch-asian="fixed" style:font-size-asian="18pt" style:font-style-asian="italic" style:font-weight-asian="normal" style:font-family-complex="Calibri" style:font-family-generic-complex="swiss" style:font-size-complex="18pt" style:font-style-complex="italic" style:font-weight-complex="normal"/>
    </style:style>
    <style:style style:name="T15" style:family="text">
      <style:text-properties fo:color="#000000" style:text-line-through-style="none" fo:font-family="Calibri" style:font-family-generic="swiss" fo:font-size="26pt" fo:letter-spacing="normal" fo:font-style="normal" style:text-underline-style="none" fo:font-weight="bold" style:font-family-asian="Calibri" style:font-pitch-asian="fixed" style:font-size-asian="26pt" style:font-style-asian="normal" style:font-weight-asian="bold" style:font-family-complex="Calibri" style:font-family-generic-complex="swiss" style:font-size-complex="26pt" style:font-style-complex="normal" style:font-weight-complex="bold"/>
    </style:style>
    <style:style style:name="T16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Calibri" style:font-pitch-asian="fixed" style:font-size-asian="24pt" style:font-style-asian="normal" style:font-weight-asian="bold" style:font-family-complex="Calibri" style:font-family-generic-complex="swiss" style:font-size-complex="24pt" style:font-style-complex="normal" style:font-weight-complex="bold"/>
    </style:style>
    <style:style style:name="T17" style:family="text">
      <style:text-properties fo:color="#000000" style:text-line-through-style="none" fo:font-family="Calibri" style:font-family-generic="swiss" fo:font-size="16pt" fo:letter-spacing="normal" fo:font-style="normal" style:text-underline-style="none" fo:font-weight="normal" style:font-family-asian="Calibri" style:font-pitch-asian="fixed" style:font-size-asian="16pt" style:font-style-asian="normal" style:font-weight-asian="normal" style:font-family-complex="Calibri" style:font-family-generic-complex="swiss" style:font-size-complex="16pt" style:font-style-complex="normal" style:font-weight-complex="normal"/>
    </style:style>
    <style:style style:name="T18" style:family="text">
      <style:text-properties fo:color="#000000" style:text-line-through-style="none" fo:font-family="Calibri" style:font-family-generic="swiss" fo:font-size="38pt" fo:letter-spacing="normal" fo:font-style="normal" style:text-underline-style="none" fo:font-weight="bold" style:font-family-asian="Calibri" style:font-pitch-asian="fixed" style:font-size-asian="38pt" style:font-style-asian="normal" style:font-weight-asian="bold" style:font-family-complex="Calibri" style:font-family-generic-complex="swiss" style:font-size-complex="38pt" style:font-style-complex="normal" style:font-weight-complex="bold"/>
    </style:style>
    <style:style style:name="T19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color="#000000" style:text-line-through-style="none" fo:font-family="Calibri" style:font-family-generic="swiss" fo:font-size="13pt" fo:letter-spacing="normal" fo:font-style="normal" style:text-underline-style="none" fo:font-weight="normal" style:font-family-asian="Calibri" style:font-pitch-asian="fixed" style:font-size-asian="13pt" style:font-style-asian="normal" style:font-weight-asian="normal" style:font-family-complex="Calibri" style:font-family-generic-complex="swiss" style:font-size-complex="13pt" style:font-style-complex="normal" style:font-weight-complex="normal"/>
    </style:style>
    <style:style style:name="T21" style:family="text">
      <style:text-properties fo:color="#000000" style:text-line-through-style="none" fo:font-family="Calibri" style:font-family-generic="swiss" fo:font-size="36pt" fo:letter-spacing="normal" fo:font-style="normal" style:text-underline-style="none" fo:font-weight="bold" style:font-family-asian="Calibri" style:font-pitch-asian="fixed" style:font-size-asian="36pt" style:font-style-asian="normal" style:font-weight-asian="bold" style:font-family-complex="Calibri" style:font-family-generic-complex="swiss" style:font-size-complex="36pt" style:font-style-complex="normal" style:font-weight-complex="bold"/>
    </style:style>
    <style:style style:name="T22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cadcfc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96167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e2761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a1a2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b728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2e86d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1f2937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c5f2d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a3b6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33.857cm" svg:height="19.049cm" svg:x="1.016cm" svg:y="0.001cm">
          <text:p/>
          <draw:enhanced-geometry svg:viewBox="0 0 21600 21600" draw:type="rectangle" draw:enhanced-path="M 0 0 L 21600 0 21600 21600 0 21600 0 0 Z N"/>
        </draw:custom-shape>
        <draw:custom-shape draw:name="Shape 1" draw:style-name="gr2" draw:text-style-name="P1" draw:layer="layout" svg:width="17.779cm" svg:height="17.779cm" svg:x="22.86cm" svg:y="-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2" draw:style-name="gr3" draw:text-style-name="P1" draw:layer="layout" svg:width="12.699cm" svg:height="12.699cm" svg:x="-5.0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3" draw:style-name="gr4" draw:text-style-name="P3" draw:layer="layout" svg:width="27.939cm" svg:height="1.269cm" svg:x="2.032cm" svg:y="5.588cm">
          <text:p text:style-name="P2"><text:span text:style-name="T1">BUILDSMART AI</text:span></text:p>
          <draw:enhanced-geometry svg:viewBox="0 0 21600 21600" draw:type="rectangle" draw:enhanced-path="M 0 0 L 21600 0 21600 21600 0 21600 0 0 Z N"/>
        </draw:custom-shape>
        <draw:custom-shape draw:name="Text 4" draw:style-name="gr4" draw:text-style-name="P3" draw:layer="layout" svg:width="29.209cm" svg:height="6.095cm" svg:x="2.032cm" svg:y="7.112cm">
          <text:p text:style-name="P2"><text:span text:style-name="T2">AI Construction Cost</text:span></text:p>
          <text:p text:style-name="P2"><text:span text:style-name="T2">&amp; Design Assistant</text:span></text:p>
          <draw:enhanced-geometry svg:viewBox="0 0 21600 21600" draw:type="rectangle" draw:enhanced-path="M 0 0 L 21600 0 21600 21600 0 21600 0 0 Z N"/>
        </draw:custom-shape>
        <draw:custom-shape draw:name="Text 5" draw:style-name="gr4" draw:text-style-name="P3" draw:layer="layout" svg:width="27.939cm" svg:height="1.523cm" svg:x="2.032cm" svg:y="13.208cm">
          <text:p text:style-name="P2"><text:span text:style-name="T3">Enterprise SaaS Platform for Smarter Building</text:span></text:p>
          <draw:enhanced-geometry svg:viewBox="0 0 21600 21600" draw:type="rectangle" draw:enhanced-path="M 0 0 L 21600 0 21600 21600 0 21600 0 0 Z N"/>
        </draw:custom-shape>
        <draw:custom-shape draw:name="Shape 6" draw:style-name="gr3" draw:text-style-name="P1" draw:layer="layout" svg:width="1.523cm" svg:height="0.202cm" svg:x="2.032cm" svg:y="15.24cm">
          <text:p/>
          <draw:enhanced-geometry svg:viewBox="0 0 21600 21600" draw:type="rectangle" draw:enhanced-path="M 0 0 L 21600 0 21600 21600 0 21600 0 0 Z N"/>
        </draw:custom-shape>
        <draw:custom-shape draw:name="Text 7" draw:style-name="gr4" draw:text-style-name="P3" draw:layer="layout" svg:width="27.939cm" svg:height="1.015cm" svg:x="2.032cm" svg:y="15.621cm">
          <text:p text:style-name="P2"><text:span text:style-name="T4">Project Presentation <text:s/>• <text:s/>202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Text 0" draw:style-name="gr4" draw:text-style-name="P3" draw:layer="layout" svg:width="12.699cm" svg:height="0.761cm" svg:x="1.524cm" svg:y="0.712cm">
          <text:p text:style-name="P2"><text:span text:style-name="T6">OVERVIEW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7">What is BuildSmart AI?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3" draw:layer="layout" svg:width="30.479cm" svg:height="4.063cm" svg:x="1.524cm" svg:y="5.08cm">
          <text:p text:style-name="P2"><text:span text:style-name="T8">BuildSmart AI is an enterprise SaaS platform that empowers homeowners, architects, engineers, contractors, and construction companies to estimate costs, generate designs, predict timelines, and assess risks — all powered by AI.</text:span></text:p>
          <draw:enhanced-geometry svg:viewBox="0 0 21600 21600" draw:type="rectangle" draw:enhanced-path="M 0 0 L 21600 0 21600 21600 0 21600 0 0 Z N"/>
        </draw:custom-shape>
        <draw:custom-shape draw:name="Shape 3" draw:style-name="gr6" draw:text-style-name="P1" draw:layer="layout" svg:width="7.238cm" svg:height="6.603cm" svg:x="1.524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4" draw:style-name="gr2" draw:text-style-name="P1" draw:layer="layout" svg:width="1.269cm" svg:height="1.269cm" svg:x="2.03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5" draw:style-name="gr4" draw:text-style-name="P3" draw:layer="layout" svg:width="1.269cm" svg:height="1.269cm" svg:x="2.032cm" svg:y="10.668cm">
          <text:p text:style-name="P6"><text:span text:style-name="T9">1</text:span></text:p>
          <draw:enhanced-geometry svg:viewBox="0 0 21600 21600" draw:type="rectangle" draw:enhanced-path="M 0 0 L 21600 0 21600 21600 0 21600 0 0 Z N"/>
        </draw:custom-shape>
        <draw:custom-shape draw:name="Text 6" draw:style-name="gr4" draw:text-style-name="P3" draw:layer="layout" svg:width="6.603cm" svg:height="1.269cm" svg:x="2.032cm" svg:y="12.446cm">
          <text:p text:style-name="P2"><text:span text:style-name="T1">Homeowners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3" draw:layer="layout" svg:width="6.603cm" svg:height="2.539cm" svg:x="2.032cm" svg:y="13.843cm">
          <text:p text:style-name="P2"><text:span text:style-name="T4">Plan dream home budgets</text:span></text:p>
          <draw:enhanced-geometry svg:viewBox="0 0 21600 21600" draw:type="rectangle" draw:enhanced-path="M 0 0 L 21600 0 21600 21600 0 21600 0 0 Z N"/>
        </draw:custom-shape>
        <draw:custom-shape draw:name="Shape 8" draw:style-name="gr6" draw:text-style-name="P1" draw:layer="layout" svg:width="7.238cm" svg:height="6.603cm" svg:x="9.271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9" draw:style-name="gr2" draw:text-style-name="P1" draw:layer="layout" svg:width="1.269cm" svg:height="1.269cm" svg:x="9.77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0" draw:style-name="gr4" draw:text-style-name="P3" draw:layer="layout" svg:width="1.269cm" svg:height="1.269cm" svg:x="9.779cm" svg:y="10.668cm">
          <text:p text:style-name="P6"><text:span text:style-name="T9">2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3" draw:layer="layout" svg:width="6.603cm" svg:height="1.269cm" svg:x="9.779cm" svg:y="12.446cm">
          <text:p text:style-name="P2"><text:span text:style-name="T1">Architects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3" draw:layer="layout" svg:width="6.603cm" svg:height="2.539cm" svg:x="9.779cm" svg:y="13.843cm">
          <text:p text:style-name="P2"><text:span text:style-name="T4">Generate optimized designs</text:span></text:p>
          <draw:enhanced-geometry svg:viewBox="0 0 21600 21600" draw:type="rectangle" draw:enhanced-path="M 0 0 L 21600 0 21600 21600 0 21600 0 0 Z N"/>
        </draw:custom-shape>
        <draw:custom-shape draw:name="Shape 13" draw:style-name="gr6" draw:text-style-name="P1" draw:layer="layout" svg:width="7.238cm" svg:height="6.603cm" svg:x="17.018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4" draw:style-name="gr2" draw:text-style-name="P1" draw:layer="layout" svg:width="1.269cm" svg:height="1.269cm" svg:x="17.526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5" draw:style-name="gr4" draw:text-style-name="P3" draw:layer="layout" svg:width="1.269cm" svg:height="1.269cm" svg:x="17.526cm" svg:y="10.668cm">
          <text:p text:style-name="P6"><text:span text:style-name="T9">3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3" draw:layer="layout" svg:width="6.603cm" svg:height="1.269cm" svg:x="17.526cm" svg:y="12.446cm">
          <text:p text:style-name="P2"><text:span text:style-name="T1">Engineers</text:span></text:p>
          <draw:enhanced-geometry svg:viewBox="0 0 21600 21600" draw:type="rectangle" draw:enhanced-path="M 0 0 L 21600 0 21600 21600 0 21600 0 0 Z N"/>
        </draw:custom-shape>
        <draw:custom-shape draw:name="Text 17" draw:style-name="gr4" draw:text-style-name="P3" draw:layer="layout" svg:width="6.603cm" svg:height="2.539cm" svg:x="17.526cm" svg:y="13.843cm">
          <text:p text:style-name="P2"><text:span text:style-name="T4">Material &amp; timeline calc</text:span></text:p>
          <draw:enhanced-geometry svg:viewBox="0 0 21600 21600" draw:type="rectangle" draw:enhanced-path="M 0 0 L 21600 0 21600 21600 0 21600 0 0 Z N"/>
        </draw:custom-shape>
        <draw:custom-shape draw:name="Shape 18" draw:style-name="gr6" draw:text-style-name="P1" draw:layer="layout" svg:width="7.238cm" svg:height="6.603cm" svg:x="24.76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9" draw:style-name="gr2" draw:text-style-name="P1" draw:layer="layout" svg:width="1.269cm" svg:height="1.269cm" svg:x="25.27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20" draw:style-name="gr4" draw:text-style-name="P3" draw:layer="layout" svg:width="1.269cm" svg:height="1.269cm" svg:x="25.273cm" svg:y="10.668cm">
          <text:p text:style-name="P6"><text:span text:style-name="T9">4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3" draw:layer="layout" svg:width="6.603cm" svg:height="1.269cm" svg:x="25.273cm" svg:y="12.446cm">
          <text:p text:style-name="P2"><text:span text:style-name="T1">Contractors</text:span></text:p>
          <draw:enhanced-geometry svg:viewBox="0 0 21600 21600" draw:type="rectangle" draw:enhanced-path="M 0 0 L 21600 0 21600 21600 0 21600 0 0 Z N"/>
        </draw:custom-shape>
        <draw:custom-shape draw:name="Text 22" draw:style-name="gr4" draw:text-style-name="P3" draw:layer="layout" svg:width="6.603cm" svg:height="2.539cm" svg:x="25.273cm" svg:y="13.843cm">
          <text:p text:style-name="P2"><text:span text:style-name="T4">Risk-aware bidding</text:span></text:p>
          <draw:enhanced-geometry svg:viewBox="0 0 21600 21600" draw:type="rectangle" draw:enhanced-path="M 0 0 L 21600 0 21600 21600 0 21600 0 0 Z N"/>
        </draw:custom-shape>
        <draw:custom-shape draw:name="Shape 23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24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25" draw:style-name="gr4" draw:text-style-name="P3" draw:layer="layout" svg:width="2.031cm" svg:height="0.659cm" svg:x="31.242cm" svg:y="18.339cm">
          <text:p text:style-name="P7"><text:span text:style-name="T10">2 /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3" draw:style-name="dp4" draw:master-page-name="Default">
        <draw:custom-shape draw:name="Text 0" draw:style-name="gr8" draw:text-style-name="P9" draw:layer="layout" svg:width="21.082cm" svg:height="1.27cm" svg:x="1.27cm" svg:y="0.254cm">
          <text:p text:style-name="P8"><text:span text:style-name="T11">THE PROBLEM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7">Construction is broken by guesswork</text:span></text:p>
          <draw:enhanced-geometry svg:viewBox="0 0 21600 21600" draw:type="rectangle" draw:enhanced-path="M 0 0 L 21600 0 21600 21600 0 21600 0 0 Z N"/>
        </draw:custom-shape>
        <draw:custom-shape draw:name="Shape 2" draw:style-name="gr9" draw:text-style-name="P1" draw:layer="layout" svg:width="10.032cm" svg:height="8.127cm" svg:x="1.524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3" draw:style-name="gr4" draw:text-style-name="P3" draw:layer="layout" svg:width="9.016cm" svg:height="4.063cm" svg:x="2.032cm" svg:y="6.604cm">
          <text:p text:style-name="P2"><text:span text:style-name="T12">85%</text:span></text:p>
          <draw:enhanced-geometry svg:viewBox="0 0 21600 21600" draw:type="rectangle" draw:enhanced-path="M 0 0 L 21600 0 21600 21600 0 21600 0 0 Z N"/>
        </draw:custom-shape>
        <draw:custom-shape draw:name="Text 4" draw:style-name="gr4" draw:text-style-name="P3" draw:layer="layout" svg:width="9.016cm" svg:height="2.539cm" svg:x="2.032cm" svg:y="10.922cm">
          <text:p text:style-name="P2"><text:span text:style-name="T13">of projects exceed budget</text:span></text:p>
          <draw:enhanced-geometry svg:viewBox="0 0 21600 21600" draw:type="rectangle" draw:enhanced-path="M 0 0 L 21600 0 21600 21600 0 21600 0 0 Z N"/>
        </draw:custom-shape>
        <draw:custom-shape draw:name="Shape 5" draw:style-name="gr9" draw:text-style-name="P1" draw:layer="layout" svg:width="10.032cm" svg:height="8.127cm" svg:x="12.065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4" draw:text-style-name="P3" draw:layer="layout" svg:width="9.016cm" svg:height="4.063cm" svg:x="12.573cm" svg:y="6.604cm">
          <text:p text:style-name="P2"><text:span text:style-name="T12">20%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3" draw:layer="layout" svg:width="9.016cm" svg:height="2.539cm" svg:x="12.573cm" svg:y="10.922cm">
          <text:p text:style-name="P2"><text:span text:style-name="T13">average schedule overrun</text:span></text:p>
          <draw:enhanced-geometry svg:viewBox="0 0 21600 21600" draw:type="rectangle" draw:enhanced-path="M 0 0 L 21600 0 21600 21600 0 21600 0 0 Z N"/>
        </draw:custom-shape>
        <draw:custom-shape draw:name="Shape 8" draw:style-name="gr9" draw:text-style-name="P1" draw:layer="layout" svg:width="10.032cm" svg:height="8.127cm" svg:x="22.478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9" draw:style-name="gr4" draw:text-style-name="P3" draw:layer="layout" svg:width="9.016cm" svg:height="4.063cm" svg:x="23.114cm" svg:y="6.604cm">
          <text:p text:style-name="P2"><text:span text:style-name="T12">$1.6T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3" draw:layer="layout" svg:width="9.016cm" svg:height="2.539cm" svg:x="23.114cm" svg:y="10.922cm">
          <text:p text:style-name="P2"><text:span text:style-name="T13">global rework cost yearly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3" draw:layer="layout" svg:width="30.479cm" svg:height="1.523cm" svg:x="1.524cm" svg:y="15.24cm">
          <text:p text:style-name="P6"><text:span text:style-name="T14">Manual estimation • Outdated tools • Siloed data • No predictive intelligence</text:span></text:p>
          <draw:enhanced-geometry svg:viewBox="0 0 21600 21600" draw:type="rectangle" draw:enhanced-path="M 0 0 L 21600 0 21600 21600 0 21600 0 0 Z N"/>
        </draw:custom-shape>
        <draw:custom-shape draw:name="Shape 12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13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3" draw:layer="layout" svg:width="2.031cm" svg:height="0.659cm" svg:x="31.242cm" svg:y="18.339cm">
          <text:p text:style-name="P7"><text:span text:style-name="T10">3 /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3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4" draw:style-name="dp4" draw:master-page-name="Default">
        <draw:custom-shape draw:name="Shape 0" draw:style-name="gr10" draw:text-style-name="P1" draw:layer="layout" svg:width="33.857cm" svg:height="2.285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11" draw:text-style-name="P10" draw:layer="layout" svg:width="30.479cm" svg:height="1.523cm" svg:x="1.27cm" svg:y="0.381cm">
          <text:p text:style-name="P2"><text:span text:style-name="T15">Our Solution</text:span></text:p>
          <draw:enhanced-geometry svg:viewBox="0 0 21600 21600" draw:type="rectangle" draw:enhanced-path="M 0 0 L 21600 0 21600 21600 0 21600 0 0 Z N"/>
        </draw:custom-shape>
        <draw:custom-shape draw:name="Text 2" draw:style-name="gr12" draw:text-style-name="P10" draw:layer="layout" svg:width="10.159cm" svg:height="0.761cm" svg:x="1.016cm" svg:y="18.034cm">
          <text:p text:style-name="P2"><text:span text:style-name="T10">BuildSmart AI</text:span></text:p>
          <draw:enhanced-geometry svg:viewBox="0 0 21600 21600" draw:type="rectangle" draw:enhanced-path="M 0 0 L 21600 0 21600 21600 0 21600 0 0 Z N"/>
        </draw:custom-shape>
        <draw:custom-shape draw:name="Text 3" draw:style-name="gr13" draw:text-style-name="P11" draw:layer="layout" svg:width="1.269cm" svg:height="0.761cm" svg:x="31.75cm" svg:y="18.034cm">
          <text:p text:style-name="P7"><text:span text:style-name="T10">4</text:span></text:p>
          <draw:enhanced-geometry svg:viewBox="0 0 21600 21600" draw:type="rectangle" draw:enhanced-path="M 0 0 L 21600 0 21600 21600 0 21600 0 0 Z N"/>
        </draw:custom-shape>
        <draw:custom-shape draw:name="Shape 4" draw:style-name="gr14" draw:text-style-name="P1" draw:layer="layout" svg:width="15.112cm" svg:height="6.095cm" svg:x="1.524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5" draw:style-name="gr15" draw:text-style-name="P10" draw:layer="layout" svg:width="13.715cm" svg:height="1.777cm" svg:x="2.286cm" svg:y="4.318cm">
          <text:p text:style-name="P2"><text:span text:style-name="T16">Predict</text:span></text:p>
          <draw:enhanced-geometry svg:viewBox="0 0 21600 21600" draw:type="rectangle" draw:enhanced-path="M 0 0 L 21600 0 21600 21600 0 21600 0 0 Z N"/>
        </draw:custom-shape>
        <draw:custom-shape draw:name="Text 6" draw:style-name="gr16" draw:text-style-name="P10" draw:layer="layout" svg:width="13.715cm" svg:height="2.793cm" svg:x="2.286cm" svg:y="6.35cm">
          <text:p text:style-name="P2"><text:span text:style-name="T17">Accurate cost estimates powered by AI</text:span></text:p>
          <draw:enhanced-geometry svg:viewBox="0 0 21600 21600" draw:type="rectangle" draw:enhanced-path="M 0 0 L 21600 0 21600 21600 0 21600 0 0 Z N"/>
        </draw:custom-shape>
        <draw:custom-shape draw:name="Shape 7" draw:style-name="gr14" draw:text-style-name="P1" draw:layer="layout" svg:width="15.112cm" svg:height="6.095cm" svg:x="17.145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17" draw:text-style-name="P10" draw:layer="layout" svg:width="13.715cm" svg:height="1.777cm" svg:x="17.907cm" svg:y="4.318cm">
          <text:p text:style-name="P2"><text:span text:style-name="T16">Design</text:span></text:p>
          <draw:enhanced-geometry svg:viewBox="0 0 21600 21600" draw:type="rectangle" draw:enhanced-path="M 0 0 L 21600 0 21600 21600 0 21600 0 0 Z N"/>
        </draw:custom-shape>
        <draw:custom-shape draw:name="Text 9" draw:style-name="gr18" draw:text-style-name="P10" draw:layer="layout" svg:width="13.715cm" svg:height="2.793cm" svg:x="17.907cm" svg:y="6.35cm">
          <text:p text:style-name="P2"><text:span text:style-name="T17">Instant building layouts from your inputs</text:span></text:p>
          <draw:enhanced-geometry svg:viewBox="0 0 21600 21600" draw:type="rectangle" draw:enhanced-path="M 0 0 L 21600 0 21600 21600 0 21600 0 0 Z N"/>
        </draw:custom-shape>
        <draw:custom-shape draw:name="Shape 10" draw:style-name="gr14" draw:text-style-name="P1" draw:layer="layout" svg:width="15.112cm" svg:height="6.095cm" svg:x="1.524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1" draw:style-name="gr19" draw:text-style-name="P10" draw:layer="layout" svg:width="13.715cm" svg:height="1.777cm" svg:x="2.286cm" svg:y="11.176cm">
          <text:p text:style-name="P2"><text:span text:style-name="T16">Plan</text:span></text:p>
          <draw:enhanced-geometry svg:viewBox="0 0 21600 21600" draw:type="rectangle" draw:enhanced-path="M 0 0 L 21600 0 21600 21600 0 21600 0 0 Z N"/>
        </draw:custom-shape>
        <draw:custom-shape draw:name="Text 12" draw:style-name="gr20" draw:text-style-name="P10" draw:layer="layout" svg:width="13.715cm" svg:height="2.793cm" svg:x="2.286cm" svg:y="13.208cm">
          <text:p text:style-name="P2"><text:span text:style-name="T17">Smart timelines and material calculations</text:span></text:p>
          <draw:enhanced-geometry svg:viewBox="0 0 21600 21600" draw:type="rectangle" draw:enhanced-path="M 0 0 L 21600 0 21600 21600 0 21600 0 0 Z N"/>
        </draw:custom-shape>
        <draw:custom-shape draw:name="Shape 13" draw:style-name="gr14" draw:text-style-name="P1" draw:layer="layout" svg:width="15.112cm" svg:height="6.095cm" svg:x="17.145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4" draw:style-name="gr21" draw:text-style-name="P10" draw:layer="layout" svg:width="13.715cm" svg:height="1.777cm" svg:x="17.907cm" svg:y="11.176cm">
          <text:p text:style-name="P2"><text:span text:style-name="T16">Decide</text:span></text:p>
          <draw:enhanced-geometry svg:viewBox="0 0 21600 21600" draw:type="rectangle" draw:enhanced-path="M 0 0 L 21600 0 21600 21600 0 21600 0 0 Z N"/>
        </draw:custom-shape>
        <draw:custom-shape draw:name="Text 15" draw:style-name="gr22" draw:text-style-name="P10" draw:layer="layout" svg:width="13.715cm" svg:height="2.793cm" svg:x="17.907cm" svg:y="13.208cm">
          <text:p text:style-name="P2"><text:span text:style-name="T17">Clear reports to back every decision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Notes Placeholder 2" presentation:style-name="pr1" draw:text-style-name="P3" draw:layer="layout" svg:width="15.239cm" svg:height="15.239cm" svg:x="1.905cm" svg:y="16.086cm" presentation:class="notes">
            <draw:text-box>
              <text:p/>
            </draw:text-box>
          </draw:frame>
          <draw:frame draw:name="Slide Number Placeholder 3" presentation:style-name="pr3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  <draw:page-thumbnail draw:style-name="gr5" draw:layer="layout" svg:width="19.049cm" svg:height="10.714cm" svg:x="0cm" svg:y="3.565cm" draw:page-number="4" presentation:class="page"/>
        </presentation:notes>
      </draw:page>
      <draw:page draw:name="page5" draw:style-name="dp3" draw:master-page-name="Default">
        <draw:custom-shape draw:name="Text 0" draw:style-name="gr4" draw:text-style-name="P14" draw:layer="layout" svg:width="12.699cm" svg:height="0.761cm" svg:x="1.524cm" svg:y="0.255cm">
          <text:p text:style-name="P8"><text:span text:style-name="T11">CORE FEATURES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18">Four AI modules, one workspace</text:span></text:p>
          <draw:enhanced-geometry svg:viewBox="0 0 21600 21600" draw:type="rectangle" draw:enhanced-path="M 0 0 L 21600 0 21600 21600 0 21600 0 0 Z N"/>
        </draw:custom-shape>
        <draw:custom-shape draw:name="Shape 2" draw:style-name="gr6" draw:text-style-name="P1" draw:layer="layout" svg:width="10.032cm" svg:height="5.587cm" svg:x="1.524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" draw:style-name="gr3" draw:text-style-name="P1" draw:layer="layout" svg:width="1.142cm" svg:height="1.142cm" svg:x="2.159cm" svg:y="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4" draw:style-name="gr4" draw:text-style-name="P3" draw:layer="layout" svg:width="1.142cm" svg:height="1.142cm" svg:x="2.159cm" svg:y="6.223cm">
          <text:p text:style-name="P6"><text:span text:style-name="T19">1</text:span></text:p>
          <draw:enhanced-geometry svg:viewBox="0 0 21600 21600" draw:type="rectangle" draw:enhanced-path="M 0 0 L 21600 0 21600 21600 0 21600 0 0 Z N"/>
        </draw:custom-shape>
        <draw:custom-shape draw:name="Text 5" draw:style-name="gr4" draw:text-style-name="P3" draw:layer="layout" svg:width="7.619cm" svg:height="1.269cm" svg:x="3.683cm" svg:y="6.096cm">
          <text:p text:style-name="P2"><text:span text:style-name="T9">Cost Prediction</text:span></text:p>
          <draw:enhanced-geometry svg:viewBox="0 0 21600 21600" draw:type="rectangle" draw:enhanced-path="M 0 0 L 21600 0 21600 21600 0 21600 0 0 Z N"/>
        </draw:custom-shape>
        <draw:custom-shape draw:name="Text 6" draw:style-name="gr4" draw:text-style-name="P3" draw:layer="layout" svg:width="9.016cm" svg:height="3.301cm" svg:x="2.159cm" svg:y="7.747cm">
          <text:p text:style-name="P2"><text:span text:style-name="T20">XGBoost-powered estimates with location indices &amp; confidence scores</text:span></text:p>
          <draw:enhanced-geometry svg:viewBox="0 0 21600 21600" draw:type="rectangle" draw:enhanced-path="M 0 0 L 21600 0 21600 21600 0 21600 0 0 Z N"/>
        </draw:custom-shape>
        <draw:custom-shape draw:name="Shape 7" draw:style-name="gr6" draw:text-style-name="P1" draw:layer="layout" svg:width="10.032cm" svg:height="5.587cm" svg:x="12.065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3" draw:text-style-name="P1" draw:layer="layout" svg:width="1.142cm" svg:height="1.142cm" svg:x="12.7cm" svg:y="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9" draw:style-name="gr4" draw:text-style-name="P3" draw:layer="layout" svg:width="1.142cm" svg:height="1.142cm" svg:x="12.7cm" svg:y="6.223cm">
          <text:p text:style-name="P6"><text:span text:style-name="T19">2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3" draw:layer="layout" svg:width="7.619cm" svg:height="1.269cm" svg:x="14.224cm" svg:y="6.096cm">
          <text:p text:style-name="P2"><text:span text:style-name="T9">Design Generator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3" draw:layer="layout" svg:width="9.016cm" svg:height="3.301cm" svg:x="12.7cm" svg:y="7.747cm">
          <text:p text:style-name="P2"><text:span text:style-name="T20">Automatic 2D/3D floor plans with space optimization</text:span></text:p>
          <draw:enhanced-geometry svg:viewBox="0 0 21600 21600" draw:type="rectangle" draw:enhanced-path="M 0 0 L 21600 0 21600 21600 0 21600 0 0 Z N"/>
        </draw:custom-shape>
        <draw:custom-shape draw:name="Shape 12" draw:style-name="gr6" draw:text-style-name="P1" draw:layer="layout" svg:width="10.032cm" svg:height="5.587cm" svg:x="22.606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3" draw:text-style-name="P1" draw:layer="layout" svg:width="1.142cm" svg:height="1.142cm" svg:x="23.241cm" svg:y="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4" draw:style-name="gr4" draw:text-style-name="P3" draw:layer="layout" svg:width="1.142cm" svg:height="1.142cm" svg:x="23.241cm" svg:y="6.223cm">
          <text:p text:style-name="P6"><text:span text:style-name="T19">3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3" draw:layer="layout" svg:width="7.619cm" svg:height="1.269cm" svg:x="24.765cm" svg:y="6.096cm">
          <text:p text:style-name="P2"><text:span text:style-name="T9">Timeline Predictor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3" draw:layer="layout" svg:width="9.016cm" svg:height="3.301cm" svg:x="23.241cm" svg:y="7.747cm">
          <text:p text:style-name="P2"><text:span text:style-name="T20">Phase-based Gantt schedules with risk adjustment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3" draw:layer="layout" svg:width="9.016cm" svg:height="3.301cm" svg:x="2.159cm" svg:y="13.843cm">
          <text:p/>
          <draw:enhanced-geometry svg:viewBox="0 0 21600 21600" draw:type="rectangle" draw:enhanced-path="M 0 0 L 21600 0 21600 21600 0 21600 0 0 Z N"/>
        </draw:custom-shape>
        <draw:custom-shape draw:name="Shape 22" draw:style-name="gr6" draw:text-style-name="P1" draw:layer="layout" svg:width="10.032cm" svg:height="5.587cm" svg:x="12.065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3" draw:style-name="gr3" draw:text-style-name="P1" draw:layer="layout" svg:width="1.142cm" svg:height="1.142cm" svg:x="12.7cm" svg:y="1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24" draw:style-name="gr23" draw:text-style-name="P15" draw:layer="layout" svg:width="1.142cm" svg:height="1.142cm" svg:x="12.7cm" svg:y="12.319cm">
          <text:p text:style-name="P6"><text:span text:style-name="T19">4</text:span></text:p>
          <draw:enhanced-geometry svg:viewBox="0 0 21600 21600" draw:type="rectangle" draw:enhanced-path="M 0 0 L 21600 0 21600 21600 0 21600 0 0 Z N"/>
        </draw:custom-shape>
        <draw:custom-shape draw:name="Text 25" draw:style-name="gr4" draw:text-style-name="P3" draw:layer="layout" svg:width="7.619cm" svg:height="1.269cm" svg:x="14.224cm" svg:y="12.192cm">
          <text:p text:style-name="P2"><text:span text:style-name="T9">AI Chatbot</text:span></text:p>
          <draw:enhanced-geometry svg:viewBox="0 0 21600 21600" draw:type="rectangle" draw:enhanced-path="M 0 0 L 21600 0 21600 21600 0 21600 0 0 Z N"/>
        </draw:custom-shape>
        <draw:custom-shape draw:name="Text 26" draw:style-name="gr4" draw:text-style-name="P3" draw:layer="layout" svg:width="9.016cm" svg:height="3.301cm" svg:x="12.7cm" svg:y="13.843cm">
          <text:p text:style-name="P2"><text:span text:style-name="T20">LangChain + GPT for instant construction guidance</text:span></text:p>
          <draw:enhanced-geometry svg:viewBox="0 0 21600 21600" draw:type="rectangle" draw:enhanced-path="M 0 0 L 21600 0 21600 21600 0 21600 0 0 Z N"/>
        </draw:custom-shape>
        <draw:custom-shape draw:name="Text 29" draw:style-name="gr4" draw:text-style-name="P3" draw:layer="layout" svg:width="1.142cm" svg:height="1.142cm" svg:x="23.241cm" svg:y="12.319cm">
          <text:p/>
          <draw:enhanced-geometry svg:viewBox="0 0 21600 21600" draw:type="rectangle" draw:enhanced-path="M 0 0 L 21600 0 21600 21600 0 21600 0 0 Z N"/>
        </draw:custom-shape>
        <draw:custom-shape draw:name="Text 30" draw:style-name="gr4" draw:text-style-name="P3" draw:layer="layout" svg:width="7.619cm" svg:height="1.269cm" svg:x="24.765cm" svg:y="12.192cm">
          <text:p/>
          <draw:enhanced-geometry svg:viewBox="0 0 21600 21600" draw:type="rectangle" draw:enhanced-path="M 0 0 L 21600 0 21600 21600 0 21600 0 0 Z N"/>
        </draw:custom-shape>
        <draw:custom-shape draw:name="Text 31" draw:style-name="gr4" draw:text-style-name="P3" draw:layer="layout" svg:width="9.016cm" svg:height="3.301cm" svg:x="23.241cm" svg:y="13.843cm">
          <text:p/>
          <draw:enhanced-geometry svg:viewBox="0 0 21600 21600" draw:type="rectangle" draw:enhanced-path="M 0 0 L 21600 0 21600 21600 0 21600 0 0 Z N"/>
        </draw:custom-shape>
        <draw:custom-shape draw:name="Shape 32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33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34" draw:style-name="gr4" draw:text-style-name="P3" draw:layer="layout" svg:width="2.031cm" svg:height="0.659cm" svg:x="31.242cm" svg:y="18.339cm">
          <text:p text:style-name="P7"><text:span text:style-name="T10">5 /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6" draw:style-name="dp4" draw:master-page-name="Default">
        <draw:custom-shape draw:name="Text 0" draw:style-name="gr4" draw:text-style-name="P14" draw:layer="layout" svg:width="12.699cm" svg:height="0.761cm" svg:x="1.524cm" svg:y="0.762cm">
          <text:p text:style-name="P8"><text:span text:style-name="T11">ARCHITECTURE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18">System architecture at a glance</text:span></text:p>
          <draw:enhanced-geometry svg:viewBox="0 0 21600 21600" draw:type="rectangle" draw:enhanced-path="M 0 0 L 21600 0 21600 21600 0 21600 0 0 Z N"/>
        </draw:custom-shape>
        <draw:custom-shape draw:name="Shape 2" draw:style-name="gr24" draw:text-style-name="P1" draw:layer="layout" svg:width="30.733cm" svg:height="2.031cm" svg:x="1.52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" draw:style-name="gr2" draw:text-style-name="P1" draw:layer="layout" svg:width="0.38cm" svg:height="2.031cm" svg:x="1.524cm" svg:y="5.334cm">
          <text:p/>
          <draw:enhanced-geometry svg:viewBox="0 0 21600 21600" draw:type="rectangle" draw:enhanced-path="M 0 0 L 21600 0 21600 21600 0 21600 0 0 Z N"/>
        </draw:custom-shape>
        <draw:custom-shape draw:name="Text 4" draw:style-name="gr4" draw:text-style-name="P3" draw:layer="layout" svg:width="8.889cm" svg:height="2.031cm" svg:x="2.54cm" svg:y="5.334cm">
          <text:p text:style-name="P2"><text:span text:style-name="T9">Frontend Layer</text:span></text:p>
          <draw:enhanced-geometry svg:viewBox="0 0 21600 21600" draw:type="rectangle" draw:enhanced-path="M 0 0 L 21600 0 21600 21600 0 21600 0 0 Z N"/>
        </draw:custom-shape>
        <draw:custom-shape draw:name="Text 5" draw:style-name="gr4" draw:text-style-name="P3" draw:layer="layout" svg:width="20.573cm" svg:height="2.031cm" svg:x="11.43cm" svg:y="5.334cm">
          <text:p text:style-name="P2"><text:span text:style-name="T4">Next.js 15 • React 19 • TailwindCSS • ShadCN UI • Zustand</text:span></text:p>
          <draw:enhanced-geometry svg:viewBox="0 0 21600 21600" draw:type="rectangle" draw:enhanced-path="M 0 0 L 21600 0 21600 21600 0 21600 0 0 Z N"/>
        </draw:custom-shape>
        <draw:custom-shape draw:name="Shape 6" draw:style-name="gr25" draw:text-style-name="P1" draw:layer="layout" svg:width="30.733cm" svg:height="2.031cm" svg:x="1.524cm" svg:y="7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7" draw:style-name="gr3" draw:text-style-name="P1" draw:layer="layout" svg:width="0.38cm" svg:height="2.031cm" svg:x="1.524cm" svg:y="7.747cm">
          <text:p/>
          <draw:enhanced-geometry svg:viewBox="0 0 21600 21600" draw:type="rectangle" draw:enhanced-path="M 0 0 L 21600 0 21600 21600 0 21600 0 0 Z N"/>
        </draw:custom-shape>
        <draw:custom-shape draw:name="Text 8" draw:style-name="gr4" draw:text-style-name="P3" draw:layer="layout" svg:width="8.889cm" svg:height="2.031cm" svg:x="2.54cm" svg:y="7.747cm">
          <text:p text:style-name="P2"><text:span text:style-name="T9">API Gateway</text:span></text:p>
          <draw:enhanced-geometry svg:viewBox="0 0 21600 21600" draw:type="rectangle" draw:enhanced-path="M 0 0 L 21600 0 21600 21600 0 21600 0 0 Z N"/>
        </draw:custom-shape>
        <draw:custom-shape draw:name="Text 9" draw:style-name="gr4" draw:text-style-name="P3" draw:layer="layout" svg:width="20.573cm" svg:height="2.031cm" svg:x="11.43cm" svg:y="7.747cm">
          <text:p text:style-name="P2"><text:span text:style-name="T4">FastAPI • REST endpoints • JWT auth • Rate limiting</text:span></text:p>
          <draw:enhanced-geometry svg:viewBox="0 0 21600 21600" draw:type="rectangle" draw:enhanced-path="M 0 0 L 21600 0 21600 21600 0 21600 0 0 Z N"/>
        </draw:custom-shape>
        <draw:custom-shape draw:name="Shape 10" draw:style-name="gr26" draw:text-style-name="P1" draw:layer="layout" svg:width="30.733cm" svg:height="2.031cm" svg:x="1.524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27" draw:text-style-name="P1" draw:layer="layout" svg:width="0.38cm" svg:height="2.031cm" svg:x="1.524cm" svg:y="10.16cm">
          <text:p/>
          <draw:enhanced-geometry svg:viewBox="0 0 21600 21600" draw:type="rectangle" draw:enhanced-path="M 0 0 L 21600 0 21600 21600 0 21600 0 0 Z N"/>
        </draw:custom-shape>
        <draw:custom-shape draw:name="Text 12" draw:style-name="gr4" draw:text-style-name="P3" draw:layer="layout" svg:width="8.889cm" svg:height="2.031cm" svg:x="2.54cm" svg:y="10.16cm">
          <text:p text:style-name="P2"><text:span text:style-name="T9">AI / ML Services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3" draw:layer="layout" svg:width="20.573cm" svg:height="2.031cm" svg:x="11.43cm" svg:y="10.16cm">
          <text:p text:style-name="P2"><text:span text:style-name="T4">XGBoost • CatBoost • Scikit-Learn • LangChain • OpenAI</text:span></text:p>
          <draw:enhanced-geometry svg:viewBox="0 0 21600 21600" draw:type="rectangle" draw:enhanced-path="M 0 0 L 21600 0 21600 21600 0 21600 0 0 Z N"/>
        </draw:custom-shape>
        <draw:custom-shape draw:name="Shape 14" draw:style-name="gr24" draw:text-style-name="P1" draw:layer="layout" svg:width="30.733cm" svg:height="2.031cm" svg:x="1.524cm" svg:y="12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5" draw:style-name="gr2" draw:text-style-name="P1" draw:layer="layout" svg:width="0.38cm" svg:height="2.031cm" svg:x="1.524cm" svg:y="12.573cm">
          <text:p/>
          <draw:enhanced-geometry svg:viewBox="0 0 21600 21600" draw:type="rectangle" draw:enhanced-path="M 0 0 L 21600 0 21600 21600 0 21600 0 0 Z N"/>
        </draw:custom-shape>
        <draw:custom-shape draw:name="Text 16" draw:style-name="gr4" draw:text-style-name="P3" draw:layer="layout" svg:width="8.889cm" svg:height="2.031cm" svg:x="2.54cm" svg:y="12.573cm">
          <text:p text:style-name="P2"><text:span text:style-name="T9">Data Layer</text:span></text:p>
          <draw:enhanced-geometry svg:viewBox="0 0 21600 21600" draw:type="rectangle" draw:enhanced-path="M 0 0 L 21600 0 21600 21600 0 21600 0 0 Z N"/>
        </draw:custom-shape>
        <draw:custom-shape draw:name="Text 17" draw:style-name="gr4" draw:text-style-name="P3" draw:layer="layout" svg:width="20.573cm" svg:height="2.031cm" svg:x="11.43cm" svg:y="12.573cm">
          <text:p text:style-name="P2"><text:span text:style-name="T4">PostgreSQL • Redis cache • SQLAlchemy ORM • Alembic</text:span></text:p>
          <draw:enhanced-geometry svg:viewBox="0 0 21600 21600" draw:type="rectangle" draw:enhanced-path="M 0 0 L 21600 0 21600 21600 0 21600 0 0 Z N"/>
        </draw:custom-shape>
        <draw:custom-shape draw:name="Shape 18" draw:style-name="gr28" draw:text-style-name="P1" draw:layer="layout" svg:width="30.733cm" svg:height="2.031cm" svg:x="1.524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9" draw:style-name="gr29" draw:text-style-name="P1" draw:layer="layout" svg:width="0.38cm" svg:height="2.031cm" svg:x="1.524cm" svg:y="14.986cm">
          <text:p/>
          <draw:enhanced-geometry svg:viewBox="0 0 21600 21600" draw:type="rectangle" draw:enhanced-path="M 0 0 L 21600 0 21600 21600 0 21600 0 0 Z N"/>
        </draw:custom-shape>
        <draw:custom-shape draw:name="Text 20" draw:style-name="gr4" draw:text-style-name="P3" draw:layer="layout" svg:width="8.889cm" svg:height="2.031cm" svg:x="2.54cm" svg:y="14.986cm">
          <text:p text:style-name="P2"><text:span text:style-name="T9">Infrastructure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3" draw:layer="layout" svg:width="20.573cm" svg:height="2.031cm" svg:x="11.43cm" svg:y="14.986cm">
          <text:p text:style-name="P2"><text:span text:style-name="T4">Docker • Kubernetes • AWS • GitHub Actions CI/CD</text:span></text:p>
          <draw:enhanced-geometry svg:viewBox="0 0 21600 21600" draw:type="rectangle" draw:enhanced-path="M 0 0 L 21600 0 21600 21600 0 21600 0 0 Z N"/>
        </draw:custom-shape>
        <draw:custom-shape draw:name="Shape 22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23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24" draw:style-name="gr4" draw:text-style-name="P3" draw:layer="layout" svg:width="2.031cm" svg:height="0.659cm" svg:x="31.242cm" svg:y="18.339cm">
          <text:p text:style-name="P7"><text:span text:style-name="T10">6 /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6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Text 0" draw:style-name="gr4" draw:text-style-name="P14" draw:layer="layout" svg:width="12.699cm" svg:height="0.761cm" svg:x="1.525cm" svg:y="0.508cm">
          <text:p text:style-name="P8"><text:span text:style-name="T11">TECH STACK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21">Built with modern, production-grade tools</text:span></text:p>
          <draw:enhanced-geometry svg:viewBox="0 0 21600 21600" draw:type="rectangle" draw:enhanced-path="M 0 0 L 21600 0 21600 21600 0 21600 0 0 Z N"/>
        </draw:custom-shape>
        <draw:custom-shape draw:name="Shape 2" draw:style-name="gr6" draw:text-style-name="P1" draw:layer="layout" svg:width="15.112cm" svg:height="5.841cm" svg:x="1.52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3" draw:style-name="gr4" draw:text-style-name="P3" draw:layer="layout" svg:width="12.699cm" svg:height="1.269cm" svg:x="2.286cm" svg:y="5.715cm">
          <text:p text:style-name="P2"><text:span text:style-name="T1">Frontend</text:span></text:p>
          <draw:enhanced-geometry svg:viewBox="0 0 21600 21600" draw:type="rectangle" draw:enhanced-path="M 0 0 L 21600 0 21600 21600 0 21600 0 0 Z N"/>
        </draw:custom-shape>
        <draw:custom-shape draw:name="Text 4" draw:style-name="gr4" draw:text-style-name="P3" draw:layer="layout" svg:width="13.588cm" svg:height="3.809cm" svg:x="2.286cm" svg:y="7.239cm">
          <text:p text:style-name="P2"><text:span text:style-name="T4">Next.js 15 <text:s text:c="2"/>• <text:s text:c="2"/>React 19 <text:s text:c="2"/>• <text:s text:c="2"/>TypeScript <text:s text:c="2"/>• <text:s text:c="2"/>TailwindCSS <text:s text:c="2"/>• <text:s text:c="2"/>ShadCN UI <text:s text:c="2"/>• <text:s text:c="2"/>Framer Motion <text:s text:c="2"/>• <text:s text:c="2"/>Recharts <text:s text:c="2"/>• <text:s text:c="2"/>Zustand</text:span></text:p>
          <draw:enhanced-geometry svg:viewBox="0 0 21600 21600" draw:type="rectangle" draw:enhanced-path="M 0 0 L 21600 0 21600 21600 0 21600 0 0 Z N"/>
        </draw:custom-shape>
        <draw:custom-shape draw:name="Shape 5" draw:style-name="gr6" draw:text-style-name="P1" draw:layer="layout" svg:width="15.112cm" svg:height="5.841cm" svg:x="17.145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4" draw:text-style-name="P3" draw:layer="layout" svg:width="12.699cm" svg:height="1.269cm" svg:x="17.907cm" svg:y="5.715cm">
          <text:p text:style-name="P2"><text:span text:style-name="T1">Backend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3" draw:layer="layout" svg:width="13.588cm" svg:height="3.809cm" svg:x="17.907cm" svg:y="7.239cm">
          <text:p text:style-name="P2"><text:span text:style-name="T4">FastAPI <text:s text:c="2"/>• <text:s text:c="2"/>Python 3.12 <text:s text:c="2"/>• <text:s text:c="2"/>SQLAlchemy <text:s text:c="2"/>• <text:s text:c="2"/>Alembic <text:s text:c="2"/>• <text:s text:c="2"/>Pydantic <text:s text:c="2"/>• <text:s text:c="2"/>Uvicorn</text:span></text:p>
          <draw:enhanced-geometry svg:viewBox="0 0 21600 21600" draw:type="rectangle" draw:enhanced-path="M 0 0 L 21600 0 21600 21600 0 21600 0 0 Z N"/>
        </draw:custom-shape>
        <draw:custom-shape draw:name="Shape 8" draw:style-name="gr6" draw:text-style-name="P1" draw:layer="layout" svg:width="15.112cm" svg:height="5.841cm" svg:x="1.524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9" draw:style-name="gr4" draw:text-style-name="P3" draw:layer="layout" svg:width="12.699cm" svg:height="1.269cm" svg:x="2.286cm" svg:y="12.065cm">
          <text:p text:style-name="P2"><text:span text:style-name="T1">AI / ML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3" draw:layer="layout" svg:width="13.588cm" svg:height="3.809cm" svg:x="2.286cm" svg:y="13.589cm">
          <text:p text:style-name="P2"><text:span text:style-name="T4">Scikit-Learn <text:s text:c="2"/>• <text:s text:c="2"/>XGBoost <text:s text:c="2"/>• <text:s text:c="2"/>CatBoost <text:s text:c="2"/>• <text:s text:c="2"/>LangChain <text:s text:c="2"/>• <text:s text:c="2"/>OpenAI API</text:span></text:p>
          <draw:enhanced-geometry svg:viewBox="0 0 21600 21600" draw:type="rectangle" draw:enhanced-path="M 0 0 L 21600 0 21600 21600 0 21600 0 0 Z N"/>
        </draw:custom-shape>
        <draw:custom-shape draw:name="Shape 11" draw:style-name="gr6" draw:text-style-name="P1" draw:layer="layout" svg:width="15.112cm" svg:height="5.841cm" svg:x="17.145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2" draw:style-name="gr4" draw:text-style-name="P3" draw:layer="layout" svg:width="12.699cm" svg:height="1.269cm" svg:x="17.907cm" svg:y="12.065cm">
          <text:p text:style-name="P2"><text:span text:style-name="T1">Infra &amp; Data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3" draw:layer="layout" svg:width="13.588cm" svg:height="3.809cm" svg:x="17.907cm" svg:y="13.589cm">
          <text:p text:style-name="P2"><text:span text:style-name="T4">PostgreSQL 15 <text:s text:c="2"/>• <text:s text:c="2"/>Redis 7 <text:s text:c="2"/>• <text:s text:c="2"/>Docker <text:s text:c="2"/>• <text:s text:c="2"/>Kubernetes <text:s text:c="2"/>• <text:s text:c="2"/>AWS <text:s text:c="2"/>• <text:s text:c="2"/>GitHub Actions</text:span></text:p>
          <draw:enhanced-geometry svg:viewBox="0 0 21600 21600" draw:type="rectangle" draw:enhanced-path="M 0 0 L 21600 0 21600 21600 0 21600 0 0 Z N"/>
        </draw:custom-shape>
        <draw:custom-shape draw:name="Shape 14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15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3" draw:layer="layout" svg:width="2.031cm" svg:height="0.659cm" svg:x="31.242cm" svg:y="18.339cm">
          <text:p text:style-name="P7"><text:span text:style-name="T10">7 /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Text 0" draw:style-name="gr4" draw:text-style-name="P3" draw:layer="layout" svg:width="12.699cm" svg:height="0.761cm" svg:x="1.524cm" svg:y="1.27cm">
          <text:p text:style-name="P2"><text:span text:style-name="T22">API ENDPOINTS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18">RESTful API surface</text:span></text:p>
          <draw:enhanced-geometry svg:viewBox="0 0 21600 21600" draw:type="rectangle" draw:enhanced-path="M 0 0 L 21600 0 21600 21600 0 21600 0 0 Z N"/>
        </draw:custom-shape>
        <draw:custom-shape draw:name="Shape 2" draw:style-name="gr30" draw:text-style-name="P1" draw:layer="layout" svg:width="15.112cm" svg:height="2.666cm" svg:x="1.524cm" svg:y="5.334cm">
          <text:p text:style-name="P1">Maps : https://genailab.tcs.in/#/model%20management/get_litellm_model_cost_map_public_litellm_model_cost_map_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" draw:style-name="gr3" draw:text-style-name="P1" draw:layer="layout" svg:width="0.304cm" svg:height="2.666cm" svg:x="1.524cm" svg:y="5.334cm">
          <text:p/>
          <draw:enhanced-geometry svg:viewBox="0 0 21600 21600" draw:type="rectangle" draw:enhanced-path="M 0 0 L 21600 0 21600 21600 0 21600 0 0 Z N"/>
        </draw:custom-shape>
        <draw:custom-shape draw:name="Shape 7" draw:style-name="gr30" draw:text-style-name="P1" draw:layer="layout" svg:width="15.112cm" svg:height="2.666cm" svg:x="17.145cm" svg:y="5.334cm">
          <text:p text:style-name="P1">Cost estimation : https://genailab.tcs.in/#/Cost%20Tracking/estimate_cost_cost_estimate_p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3" draw:text-style-name="P1" draw:layer="layout" svg:width="0.304cm" svg:height="2.666cm" svg:x="17.145cm" svg:y="5.334cm">
          <text:p/>
          <draw:enhanced-geometry svg:viewBox="0 0 21600 21600" draw:type="rectangle" draw:enhanced-path="M 0 0 L 21600 0 21600 21600 0 21600 0 0 Z N"/>
        </draw:custom-shape>
        <draw:custom-shape draw:name="Shape 42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43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44" draw:style-name="gr4" draw:text-style-name="P3" draw:layer="layout" svg:width="2.031cm" svg:height="0.659cm" svg:x="31.242cm" svg:y="18.339cm">
          <text:p text:style-name="P7"><text:span text:style-name="T10">9 / 12</text:span></text:p>
          <draw:enhanced-geometry svg:viewBox="0 0 21600 21600" draw:type="rectangle" draw:enhanced-path="M 0 0 L 21600 0 21600 21600 0 21600 0 0 Z N"/>
        </draw:custom-shape>
        <draw:custom-shape draw:name="Shape 2" draw:style-name="gr30" draw:text-style-name="P1" draw:layer="layout" svg:width="15.366cm" svg:height="3.556cm" svg:x="1.652cm" svg:y="10.668cm">
          <text:p text:style-name="P1">Designs : https://genailab.tcs.in/#/images/image_generation_openai_deployments__model__images_generations_p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" draw:style-name="gr3" draw:text-style-name="P1" draw:layer="layout" svg:width="0.38cm" svg:height="3.556cm" svg:x="1.65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9" draw:style-name="dp4" draw:master-page-name="Default">
        <draw:custom-shape draw:name="Text 0" draw:style-name="gr4" draw:text-style-name="P3" draw:layer="layout" svg:width="12.699cm" svg:height="0.761cm" svg:x="1.524cm" svg:y="1.27cm">
          <text:p text:style-name="P2"><text:span text:style-name="T22">ENTERPRISE READY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18">Security &amp; performance built in</text:span></text:p>
          <draw:enhanced-geometry svg:viewBox="0 0 21600 21600" draw:type="rectangle" draw:enhanced-path="M 0 0 L 21600 0 21600 21600 0 21600 0 0 Z N"/>
        </draw:custom-shape>
        <draw:custom-shape draw:name="Shape 2" draw:style-name="gr31" draw:text-style-name="P1" draw:layer="layout" svg:width="15.112cm" svg:height="11.937cm" svg:x="1.52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3" draw:style-name="gr4" draw:text-style-name="P3" draw:layer="layout" svg:width="12.699cm" svg:height="1.269cm" svg:x="2.286cm" svg:y="5.842cm">
          <text:p text:style-name="P2"><text:span text:style-name="T16">Security</text:span></text:p>
          <draw:enhanced-geometry svg:viewBox="0 0 21600 21600" draw:type="rectangle" draw:enhanced-path="M 0 0 L 21600 0 21600 21600 0 21600 0 0 Z N"/>
        </draw:custom-shape>
        <draw:custom-shape draw:name="Text 4" draw:style-name="gr4" draw:text-style-name="P3" draw:layer="layout" svg:width="13.715cm" svg:height="9.651cm" svg:x="2.286cm" svg:y="7.493cm">
          <text:p text:style-name="P16"><text:span text:style-name="T17">✓ <text:s/></text:span><text:span text:style-name="T17">JWT authentication</text:span></text:p>
          <text:p text:style-name="P16"><text:span text:style-name="T17">✓ <text:s/></text:span><text:span text:style-name="T17">Role-based access control</text:span></text:p>
          <text:p text:style-name="P16"><text:span text:style-name="T17">✓ <text:s/></text:span><text:span text:style-name="T17">Input validation &amp; sanitization</text:span></text:p>
          <text:p text:style-name="P16"><text:span text:style-name="T17">✓ <text:s/></text:span><text:span text:style-name="T17">SQL injection prevention</text:span></text:p>
          <text:p text:style-name="P16"><text:span text:style-name="T17">✓ <text:s/></text:span><text:span text:style-name="T17">CORS &amp; rate limiting</text:span></text:p>
          <text:p text:style-name="P16"><text:span text:style-name="T17">✓ <text:s/></text:span><text:span text:style-name="T17">Bcrypt password hashing</text:span></text:p>
          <draw:enhanced-geometry svg:viewBox="0 0 21600 21600" draw:type="rectangle" draw:enhanced-path="M 0 0 L 21600 0 21600 21600 0 21600 0 0 Z N"/>
        </draw:custom-shape>
        <draw:custom-shape draw:name="Shape 5" draw:style-name="gr32" draw:text-style-name="P1" draw:layer="layout" svg:width="15.112cm" svg:height="11.937cm" svg:x="17.145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4" draw:text-style-name="P3" draw:layer="layout" svg:width="12.699cm" svg:height="1.269cm" svg:x="17.907cm" svg:y="5.842cm">
          <text:p text:style-name="P2"><text:span text:style-name="T16">Performance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3" draw:layer="layout" svg:width="13.715cm" svg:height="9.651cm" svg:x="17.907cm" svg:y="7.493cm">
          <text:p text:style-name="P16"><text:span text:style-name="T17">✓ <text:s/></text:span><text:span text:style-name="T17">Indexed database queries</text:span></text:p>
          <text:p text:style-name="P16"><text:span text:style-name="T17">✓ <text:s/></text:span><text:span text:style-name="T17">Redis caching layer</text:span></text:p>
          <text:p text:style-name="P16"><text:span text:style-name="T17">✓ <text:s/></text:span><text:span text:style-name="T17">API response compression</text:span></text:p>
          <text:p text:style-name="P16"><text:span text:style-name="T17">✓ <text:s/></text:span><text:span text:style-name="T17">Frontend code splitting</text:span></text:p>
          <text:p text:style-name="P16"><text:span text:style-name="T17">✓ <text:s/></text:span><text:span text:style-name="T17">Image optimization</text:span></text:p>
          <text:p text:style-name="P16"><text:span text:style-name="T17">✓ <text:s/></text:span><text:span text:style-name="T17">CDN integration ready</text:span></text:p>
          <draw:enhanced-geometry svg:viewBox="0 0 21600 21600" draw:type="rectangle" draw:enhanced-path="M 0 0 L 21600 0 21600 21600 0 21600 0 0 Z N"/>
        </draw:custom-shape>
        <draw:custom-shape draw:name="Shape 8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9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3" draw:layer="layout" svg:width="2.031cm" svg:height="0.659cm" svg:x="31.242cm" svg:y="18.339cm">
          <text:p text:style-name="P7"><text:span text:style-name="T10">10 /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Text 0" draw:style-name="gr4" draw:text-style-name="P3" draw:layer="layout" svg:width="12.699cm" svg:height="0.761cm" svg:x="1.524cm" svg:y="1.27cm">
          <text:p text:style-name="P2"><text:span text:style-name="T22">ROADMAP</text:span></text:p>
          <draw:enhanced-geometry svg:viewBox="0 0 21600 21600" draw:type="rectangle" draw:enhanced-path="M 0 0 L 21600 0 21600 21600 0 21600 0 0 Z N"/>
        </draw:custom-shape>
        <draw:custom-shape draw:name="Text 1" draw:style-name="gr4" draw:text-style-name="P3" draw:layer="layout" svg:width="30.479cm" svg:height="2.285cm" svg:x="1.524cm" svg:y="2.159cm">
          <text:p text:style-name="P2"><text:span text:style-name="T18">What's next for BuildSmart AI</text:span></text:p>
          <draw:enhanced-geometry svg:viewBox="0 0 21600 21600" draw:type="rectangle" draw:enhanced-path="M 0 0 L 21600 0 21600 21600 0 21600 0 0 Z N"/>
        </draw:custom-shape>
        <draw:custom-shape draw:name="Shape 2" draw:style-name="gr6" draw:text-style-name="P1" draw:layer="layout" svg:width="7.238cm" svg:height="10.921cm" svg:x="1.524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" draw:style-name="gr33" draw:text-style-name="P1" draw:layer="layout" svg:width="7.238cm" svg:height="1.777cm" svg:x="1.524cm" svg:y="5.842cm">
          <text:p/>
          <draw:enhanced-geometry svg:viewBox="0 0 21600 21600" draw:type="rectangle" draw:enhanced-path="M 0 0 L 21600 0 21600 21600 0 21600 0 0 Z N"/>
        </draw:custom-shape>
        <draw:custom-shape draw:name="Text 4" draw:style-name="gr4" draw:text-style-name="P3" draw:layer="layout" svg:width="7.238cm" svg:height="1.777cm" svg:x="1.524cm" svg:y="5.842cm">
          <text:p text:style-name="P6"><text:span text:style-name="T16">1</text:span></text:p>
          <draw:enhanced-geometry svg:viewBox="0 0 21600 21600" draw:type="rectangle" draw:enhanced-path="M 0 0 L 21600 0 21600 21600 0 21600 0 0 Z N"/>
        </draw:custom-shape>
        <draw:custom-shape draw:name="Text 5" draw:style-name="gr4" draw:text-style-name="P3" draw:layer="layout" svg:width="6.222cm" svg:height="1.777cm" svg:x="2.032cm" svg:y="8.128cm">
          <text:p text:style-name="P2"><text:span text:style-name="T1">Mobile App</text:span></text:p>
          <draw:enhanced-geometry svg:viewBox="0 0 21600 21600" draw:type="rectangle" draw:enhanced-path="M 0 0 L 21600 0 21600 21600 0 21600 0 0 Z N"/>
        </draw:custom-shape>
        <draw:custom-shape draw:name="Text 6" draw:style-name="gr4" draw:text-style-name="P3" draw:layer="layout" svg:width="6.222cm" svg:height="6.349cm" svg:x="2.032cm" svg:y="10.16cm">
          <text:p text:style-name="P2"><text:span text:style-name="T4">React Native iOS + Android</text:span></text:p>
          <draw:enhanced-geometry svg:viewBox="0 0 21600 21600" draw:type="rectangle" draw:enhanced-path="M 0 0 L 21600 0 21600 21600 0 21600 0 0 Z N"/>
        </draw:custom-shape>
        <draw:custom-shape draw:name="Shape 7" draw:style-name="gr6" draw:text-style-name="P1" draw:layer="layout" svg:width="7.238cm" svg:height="10.921cm" svg:x="9.271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33" draw:text-style-name="P1" draw:layer="layout" svg:width="7.238cm" svg:height="1.777cm" svg:x="9.271cm" svg:y="5.842cm">
          <text:p/>
          <draw:enhanced-geometry svg:viewBox="0 0 21600 21600" draw:type="rectangle" draw:enhanced-path="M 0 0 L 21600 0 21600 21600 0 21600 0 0 Z N"/>
        </draw:custom-shape>
        <draw:custom-shape draw:name="Text 9" draw:style-name="gr4" draw:text-style-name="P3" draw:layer="layout" svg:width="7.238cm" svg:height="1.777cm" svg:x="9.271cm" svg:y="5.842cm">
          <text:p text:style-name="P6"><text:span text:style-name="T16">2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3" draw:layer="layout" svg:width="6.222cm" svg:height="1.777cm" svg:x="9.779cm" svg:y="8.128cm">
          <text:p text:style-name="P2"><text:span text:style-name="T1">3D &amp; AR/VR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3" draw:layer="layout" svg:width="6.222cm" svg:height="6.349cm" svg:x="9.779cm" svg:y="10.16cm">
          <text:p text:style-name="P2"><text:span text:style-name="T4">Advanced visualization</text:span></text:p>
          <draw:enhanced-geometry svg:viewBox="0 0 21600 21600" draw:type="rectangle" draw:enhanced-path="M 0 0 L 21600 0 21600 21600 0 21600 0 0 Z N"/>
        </draw:custom-shape>
        <draw:custom-shape draw:name="Shape 12" draw:style-name="gr6" draw:text-style-name="P1" draw:layer="layout" svg:width="7.238cm" svg:height="10.921cm" svg:x="17.018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33" draw:text-style-name="P1" draw:layer="layout" svg:width="7.238cm" svg:height="1.777cm" svg:x="17.018cm" svg:y="5.842cm">
          <text:p/>
          <draw:enhanced-geometry svg:viewBox="0 0 21600 21600" draw:type="rectangle" draw:enhanced-path="M 0 0 L 21600 0 21600 21600 0 21600 0 0 Z N"/>
        </draw:custom-shape>
        <draw:custom-shape draw:name="Text 14" draw:style-name="gr4" draw:text-style-name="P3" draw:layer="layout" svg:width="7.238cm" svg:height="1.777cm" svg:x="17.018cm" svg:y="5.842cm">
          <text:p text:style-name="P6"><text:span text:style-name="T16">3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3" draw:layer="layout" svg:width="6.222cm" svg:height="1.777cm" svg:x="17.526cm" svg:y="8.128cm">
          <text:p text:style-name="P2"><text:span text:style-name="T1">ML Pipeline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3" draw:layer="layout" svg:width="6.222cm" svg:height="6.349cm" svg:x="17.526cm" svg:y="10.16cm">
          <text:p text:style-name="P2"><text:span text:style-name="T4">Continuous model training</text:span></text:p>
          <draw:enhanced-geometry svg:viewBox="0 0 21600 21600" draw:type="rectangle" draw:enhanced-path="M 0 0 L 21600 0 21600 21600 0 21600 0 0 Z N"/>
        </draw:custom-shape>
        <draw:custom-shape draw:name="Shape 17" draw:style-name="gr6" draw:text-style-name="P1" draw:layer="layout" svg:width="7.238cm" svg:height="10.921cm" svg:x="24.765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8" draw:style-name="gr33" draw:text-style-name="P1" draw:layer="layout" svg:width="7.238cm" svg:height="1.777cm" svg:x="24.765cm" svg:y="5.842cm">
          <text:p/>
          <draw:enhanced-geometry svg:viewBox="0 0 21600 21600" draw:type="rectangle" draw:enhanced-path="M 0 0 L 21600 0 21600 21600 0 21600 0 0 Z N"/>
        </draw:custom-shape>
        <draw:custom-shape draw:name="Text 19" draw:style-name="gr4" draw:text-style-name="P3" draw:layer="layout" svg:width="7.238cm" svg:height="1.777cm" svg:x="24.765cm" svg:y="5.842cm">
          <text:p text:style-name="P6"><text:span text:style-name="T16">4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3" draw:layer="layout" svg:width="6.222cm" svg:height="1.777cm" svg:x="25.273cm" svg:y="8.128cm">
          <text:p text:style-name="P2"><text:span text:style-name="T1">Collaboration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3" draw:layer="layout" svg:width="6.222cm" svg:height="6.349cm" svg:x="25.273cm" svg:y="10.16cm">
          <text:p text:style-name="P2"><text:span text:style-name="T4">Real-time multi-user editing</text:span></text:p>
          <draw:enhanced-geometry svg:viewBox="0 0 21600 21600" draw:type="rectangle" draw:enhanced-path="M 0 0 L 21600 0 21600 21600 0 21600 0 0 Z N"/>
        </draw:custom-shape>
        <draw:custom-shape draw:name="Shape 22" draw:style-name="gr7" draw:text-style-name="P1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Text 23" draw:style-name="gr4" draw:text-style-name="P3" draw:layer="layout" svg:width="20.319cm" svg:height="0.659cm" svg:x="1.016cm" svg:y="18.339cm">
          <text:p text:style-name="P2"><text:span text:style-name="T10">BuildSmart AI <text:s/>| <text:s/>Enterprise SaaS</text:span></text:p>
          <draw:enhanced-geometry svg:viewBox="0 0 21600 21600" draw:type="rectangle" draw:enhanced-path="M 0 0 L 21600 0 21600 21600 0 21600 0 0 Z N"/>
        </draw:custom-shape>
        <draw:custom-shape draw:name="Text 24" draw:style-name="gr4" draw:text-style-name="P3" draw:layer="layout" svg:width="2.031cm" svg:height="0.659cm" svg:x="31.242cm" svg:y="18.339cm">
          <text:p text:style-name="P7"><text:span text:style-name="T10">11 /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0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1" draw:text-style-name="P1" draw:layer="layout" svg:width="33.857cm" svg:height="19.049cm" svg:x="1.016cm" svg:y="0.001cm">
          <text:p/>
          <draw:enhanced-geometry svg:viewBox="0 0 21600 21600" draw:type="rectangle" draw:enhanced-path="M 0 0 L 21600 0 21600 21600 0 21600 0 0 Z N"/>
        </draw:custom-shape>
        <draw:custom-shape draw:name="Shape 1" draw:style-name="gr2" draw:text-style-name="P1" draw:layer="layout" svg:width="17.779cm" svg:height="17.779cm" svg:x="22.86cm" svg:y="-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2" draw:style-name="gr3" draw:text-style-name="P1" draw:layer="layout" svg:width="12.699cm" svg:height="12.699cm" svg:x="-5.0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3" draw:style-name="gr34" draw:text-style-name="P10" draw:layer="layout" svg:width="27.939cm" svg:height="1.269cm" svg:x="2.032cm" svg:y="5.588cm">
          <text:p text:style-name="P2"><text:span text:style-name="T1">BUILDSMART AI</text:span></text:p>
          <draw:enhanced-geometry svg:viewBox="0 0 21600 21600" draw:type="rectangle" draw:enhanced-path="M 0 0 L 21600 0 21600 21600 0 21600 0 0 Z N"/>
        </draw:custom-shape>
        <draw:custom-shape draw:name="Text 4" draw:style-name="gr35" draw:text-style-name="P10" draw:layer="layout" svg:width="29.209cm" svg:height="6.095cm" svg:x="2.032cm" svg:y="7.112cm">
          <text:p text:style-name="P2"><text:span text:style-name="T2">Thank You</text:span></text:p>
          <draw:enhanced-geometry svg:viewBox="0 0 21600 21600" draw:type="rectangle" draw:enhanced-path="M 0 0 L 21600 0 21600 21600 0 21600 0 0 Z N"/>
        </draw:custom-shape>
        <draw:custom-shape draw:name="Text 5" draw:style-name="gr36" draw:text-style-name="P10" draw:layer="layout" svg:width="27.939cm" svg:height="1.523cm" svg:x="2.032cm" svg:y="13.208cm">
          <text:p/>
          <draw:enhanced-geometry svg:viewBox="0 0 21600 21600" draw:type="rectangle" draw:enhanced-path="M 0 0 L 21600 0 21600 21600 0 21600 0 0 Z N"/>
        </draw:custom-shape>
        <draw:custom-shape draw:name="Shape 6" draw:style-name="gr3" draw:text-style-name="P1" draw:layer="layout" svg:width="1.523cm" svg:height="0.202cm" svg:x="2.032cm" svg:y="15.24cm">
          <text:p/>
          <draw:enhanced-geometry svg:viewBox="0 0 21600 21600" draw:type="rectangle" draw:enhanced-path="M 0 0 L 21600 0 21600 21600 0 21600 0 0 Z N"/>
        </draw:custom-shape>
        <draw:custom-shape draw:name="Text 7" draw:style-name="gr37" draw:text-style-name="P10" draw:layer="layout" svg:width="27.939cm" svg:height="1.015cm" svg:x="2.032cm" svg:y="15.62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Notes Placeholder 2" presentation:style-name="pr1" draw:text-style-name="P3" draw:layer="layout" svg:width="15.239cm" svg:height="15.239cm" svg:x="1.905cm" svg:y="16.086cm" presentation:class="notes">
            <draw:text-box>
              <text:p/>
            </draw:text-box>
          </draw:frame>
          <draw:frame draw:name="Slide Number Placeholder 3" presentation:style-name="pr4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  <draw:page-thumbnail draw:style-name="gr5" draw:layer="layout" svg:width="19.049cm" svg:height="10.714cm" svg:x="0cm" svg:y="3.56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6-06-12T13:39:20.18</dc:date>
    <dc:creator>Uriel Torres</dc:creator>
    <meta:generator>OpenOffice/4.1.15$Win32 OpenOffice.org_project/4115m2$Build-9813</meta:generator>
    <meta:editing-duration>PT1H3M28S</meta:editing-duration>
    <meta:editing-cycles>6</meta:editing-cycles>
    <meta:document-statistic meta:object-count="242"/>
  </office:meta>
</office:document-meta>
</file>